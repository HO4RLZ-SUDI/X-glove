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DejaVu Sans" style:font-name-complex="Noto Sans Arab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mout ( p )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SP32-C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pu6050 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x sensor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2160" calcext:value-type="float">
            <text:p>216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ถุงมือ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70" calcext:value-type="float">
            <text:p>170</text:p>
          </table:table-cell>
          <table:table-cell table:style-name="ce4" office:value-type="string" calcext:value-type="string">
            <text:p>ยอดสุทธิ</text:p>
          </table:table-cell>
          <table:table-cell table:style-name="ce4" office:value-type="string" calcext:value-type="string">
            <text:p>คงเหลือ</text:p>
          </table:table-cell>
        </table:table-row>
        <table:table-row table:style-name="ro1">
          <table:table-cell table:number-columns-repeated="4"/>
          <table:table-cell table:formula="of:=SUM([.D2:.D5])" office:value-type="float" office:value="2638" calcext:value-type="float">
            <text:p>2638</text:p>
          </table:table-cell>
          <table:table-cell table:style-name="ce4" table:formula="of:= 3500 - [.E6]" office:value-type="float" office:value="862" calcext:value-type="float">
            <text:p>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 style:data-style-name="N2" text:time-value="16:11:14.3600406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20:40:33.205142081</meta:creation-date>
    <dc:date>2026-06-11T18:02:54.093349516</dc:date>
    <meta:editing-duration>PT1H58M46S</meta:editing-duration>
    <meta:editing-cycles>2</meta:editing-cycles>
    <meta:generator>LibreOffice/26.2.3.2$Linux_X86_64 LibreOffice_project/620$Build-2</meta:generator>
    <meta:document-statistic meta:table-count="1" meta:cell-count="24" meta:object-count="0"/>
  </office:meta>
</office:document-meta>
</file>